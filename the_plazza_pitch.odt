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40pt" fo:font-weight="bold" officeooo:rsid="0014c842" officeooo:paragraph-rsid="0014c842" style:font-size-asian="40pt" style:font-weight-asian="bold" style:font-size-complex="40pt" style:font-weight-complex="bold"/>
    </style:style>
    <style:style style:name="P2" style:family="paragraph" style:parent-style-name="Standard">
      <style:text-properties officeooo:rsid="0014c842" officeooo:paragraph-rsid="0014c842"/>
    </style:style>
    <style:style style:name="P3" style:family="paragraph" style:parent-style-name="Standard">
      <style:paragraph-properties fo:text-align="center" style:justify-single-word="false"/>
      <style:text-properties officeooo:rsid="0014c842" officeooo:paragraph-rsid="0014c842"/>
    </style:style>
    <style:style style:name="P4" style:family="paragraph" style:parent-style-name="Standard">
      <style:paragraph-properties fo:text-align="start" style:justify-single-word="false"/>
      <style:text-properties fo:font-size="20pt" fo:font-weight="bold" officeooo:rsid="00206360" officeooo:paragraph-rsid="00206360" style:font-size-asian="20pt" style:font-weight-asian="bold" style:font-size-complex="20pt" style:font-weight-complex="bold"/>
    </style:style>
    <style:style style:name="P5" style:family="paragraph" style:parent-style-name="Standard">
      <style:text-properties officeooo:rsid="00206360" officeooo:paragraph-rsid="00206360"/>
    </style:style>
    <style:style style:name="P6" style:family="paragraph" style:parent-style-name="Standard">
      <style:text-properties officeooo:rsid="0014c842" officeooo:paragraph-rsid="001694b9"/>
    </style:style>
    <style:style style:name="P7" style:family="paragraph" style:parent-style-name="Standard">
      <style:paragraph-properties fo:text-align="center" style:justify-single-word="false"/>
      <style:text-properties fo:font-size="20pt" fo:font-weight="bold" officeooo:rsid="0014c842" officeooo:paragraph-rsid="0014c842" style:font-size-asian="20pt" style:font-weight-asian="bold" style:font-size-complex="20pt" style:font-weight-complex="bold"/>
    </style:style>
    <style:style style:name="P8" style:family="paragraph" style:parent-style-name="Standard">
      <style:text-properties fo:font-size="20pt" fo:font-weight="bold" officeooo:rsid="0014c842" officeooo:paragraph-rsid="0014c842" style:font-size-asian="20pt" style:font-weight-asian="bold" style:font-size-complex="20pt" style:font-weight-complex="bold"/>
    </style:style>
    <style:style style:name="P9" style:family="paragraph" style:parent-style-name="Standard">
      <style:text-properties officeooo:rsid="001694b9" officeooo:paragraph-rsid="0017e07b"/>
    </style:style>
    <style:style style:name="P10" style:family="paragraph" style:parent-style-name="Standard">
      <style:text-properties officeooo:rsid="0017e07b" officeooo:paragraph-rsid="0017e07b"/>
    </style:style>
    <style:style style:name="P11" style:family="paragraph" style:parent-style-name="Standard">
      <style:text-properties officeooo:rsid="0017e07b" officeooo:paragraph-rsid="0019b826"/>
    </style:style>
    <style:style style:name="P12" style:family="paragraph" style:parent-style-name="Standard">
      <style:text-properties officeooo:rsid="0019b826" officeooo:paragraph-rsid="0019b826"/>
    </style:style>
    <style:style style:name="P13" style:family="paragraph" style:parent-style-name="Standard">
      <style:text-properties officeooo:rsid="0017e07b" officeooo:paragraph-rsid="001a3040"/>
    </style:style>
    <style:style style:name="P14" style:family="paragraph" style:parent-style-name="Standard">
      <style:text-properties officeooo:rsid="001b1aeb" officeooo:paragraph-rsid="001a3040"/>
    </style:style>
    <style:style style:name="P15" style:family="paragraph" style:parent-style-name="Standard">
      <style:text-properties officeooo:rsid="001b1aeb" officeooo:paragraph-rsid="001b1aeb"/>
    </style:style>
    <style:style style:name="P16" style:family="paragraph" style:parent-style-name="Standard">
      <style:text-properties officeooo:rsid="001cdd56" officeooo:paragraph-rsid="001cdd56"/>
    </style:style>
    <style:style style:name="P17" style:family="paragraph" style:parent-style-name="Standard">
      <style:text-properties officeooo:rsid="0014c842" officeooo:paragraph-rsid="001a3040"/>
    </style:style>
    <style:style style:name="P18" style:family="paragraph" style:parent-style-name="Standard">
      <style:text-properties officeooo:rsid="001cf796" officeooo:paragraph-rsid="001cf796"/>
    </style:style>
    <style:style style:name="P19" style:family="paragraph" style:parent-style-name="Standard">
      <style:text-properties officeooo:rsid="0014c842" officeooo:paragraph-rsid="001cf796"/>
    </style:style>
    <style:style style:name="P20" style:family="paragraph" style:parent-style-name="Standard">
      <style:text-properties fo:font-size="20pt" fo:font-weight="bold" officeooo:rsid="00206360" officeooo:paragraph-rsid="00206360" style:font-size-asian="20pt" style:font-weight-asian="bold" style:font-size-complex="20pt" style:font-weight-complex="bold"/>
    </style:style>
    <style:style style:name="P21" style:family="paragraph" style:parent-style-name="Standard">
      <style:text-properties officeooo:rsid="00147373" officeooo:paragraph-rsid="001cf796"/>
    </style:style>
    <style:style style:name="P22" style:family="paragraph" style:parent-style-name="Standard">
      <style:text-properties officeooo:rsid="001e7216" officeooo:paragraph-rsid="001e7216"/>
    </style:style>
    <style:style style:name="P23" style:family="paragraph" style:parent-style-name="Standard">
      <style:paragraph-properties fo:text-align="center" style:justify-single-word="false"/>
      <style:text-properties fo:font-size="20pt" fo:font-weight="bold" officeooo:rsid="0014c842" officeooo:paragraph-rsid="00206360" style:font-size-asian="20pt" style:font-weight-asian="bold" style:font-size-complex="20pt" style:font-weight-complex="bold"/>
    </style:style>
    <style:style style:name="P24" style:family="paragraph" style:parent-style-name="Standard">
      <style:text-properties fo:font-size="20pt" fo:font-weight="bold" officeooo:rsid="00147373" officeooo:paragraph-rsid="00147373" style:font-size-asian="20pt" style:font-weight-asian="bold" style:font-size-complex="20pt" style:font-weight-complex="bold"/>
    </style:style>
    <style:style style:name="P25" style:family="paragraph" style:parent-style-name="Standard">
      <style:text-properties officeooo:rsid="00147373" officeooo:paragraph-rsid="00147373"/>
    </style:style>
    <style:style style:name="T1" style:family="text">
      <style:text-properties officeooo:rsid="001694b9"/>
    </style:style>
    <style:style style:name="T2" style:family="text">
      <style:text-properties officeooo:rsid="00206360"/>
    </style:style>
    <style:style style:name="T3" style:family="text">
      <style:text-properties officeooo:rsid="0014c842"/>
    </style:style>
    <style:style style:name="T4" style:family="text">
      <style:text-properties officeooo:rsid="0021a19f"/>
    </style:style>
    <style:style style:name="T5" style:family="text">
      <style:text-properties officeooo:rsid="0019b826"/>
    </style:style>
    <style:style style:name="T6" style:family="text">
      <style:text-properties officeooo:rsid="001a3040"/>
    </style:style>
    <style:style style:name="T7" style:family="text">
      <style:text-properties officeooo:rsid="001b1723"/>
    </style:style>
    <style:style style:name="T8" style:family="text">
      <style:text-properties officeooo:rsid="001cdd56"/>
    </style:style>
    <style:style style:name="T9" style:family="text">
      <style:text-properties officeooo:rsid="001cf7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LAZZA</text:p>
      <text:p text:style-name="P2"/>
      <text:p text:style-name="P3">09-29/05/2026</text:p>
      <text:p text:style-name="P3">Projet EPITECH de 2ème année</text:p>
      <text:p text:style-name="P3">réalisé avec arthur Lazaro et <text:span text:style-name="T1">m</text:span>oi même Mint Cambot</text:p>
      <text:p text:style-name="P2"/>
      <text:p text:style-name="P2">---</text:p>
      <text:p text:style-name="P4">SOMMAIRE:</text:p>
      <text:p text:style-name="P2"/>
      <text:p text:style-name="P2"><text:span text:style-name="T2">1) </text:span>contexte</text:p>
      <text:p text:style-name="P2">- <text:span text:style-name="T2">Plazza, c’est quoi</text:span></text:p>
      <text:p text:style-name="P2">- <text:span text:style-name="T2">brainstorm</text:span></text:p>
      <text:p text:style-name="P2"/>
      <text:p text:style-name="P5">2) L’exection du planning</text:p>
      <text:p text:style-name="P2">- principaux freins</text:p>
      <text:p text:style-name="P2">- ce qui a été fait</text:p>
      <text:p text:style-name="P2">- le rendu- sauver les pots cassés</text:p>
      <text:p text:style-name="P2"/>
      <text:p text:style-name="P5">Conclusion, comment faire <text:span text:style-name="T3">la prochaine fois?</text:span></text:p>
      <text:p text:style-name="P2"/>
      <text:p text:style-name="P2">---</text:p>
      <text:p text:style-name="P2"/>
      <text:p text:style-name="P6">Aujourd’hui, <text:span text:style-name="T1">nous sommes le </text:span><text:span text:style-name="T4">2</text:span> <text:span text:style-name="T4">Juin</text:span>, trois jours après ce rendu décisif:</text:p>
      <text:p text:style-name="P6">plazza n’est pas fini.</text:p>
      <text:p text:style-name="P6"/>
      <text:p text:style-name="P6"/>
      <text:p text:style-name="P2"><text:span text:style-name="T1">Sachant </text:span>que trois semaines plus tot, j’étais déjà au boulot, prête à en découdre, tout juste après une séance de coaching avec JG, après un stage très formateur sur dans le domain<text:span text:style-name="T1">e</text:span>, j’avais tout prévu:</text:p>
      <text:p text:style-name="P2">- la stratégie de travail</text:p>
      <text:p text:style-name="P2">- la répartition des taches</text:p>
      <text:p text:style-name="P2">- l’architecture</text:p>
      <text:p text:style-name="P2">- les réunions d’avancée.</text:p>
      <text:p text:style-name="P2"/>
      <text:p text:style-name="P2">Mais alors, qu’est ce qui a mal tourné?</text:p>
      <text:p text:style-name="P2"/>
      <text:p text:style-name="P2"/>
      <text:p text:style-name="P2"/>
      <text:p text:style-name="P2"/>
      <text:p text:style-name="P2"/>
      <text:p text:style-name="P2"/>
      <text:p text:style-name="P2"/>
      <text:p text:style-name="P2"/>
      <text:p text:style-name="P7">-</text:p>
      <text:p text:style-name="P2"/>
      <text:p text:style-name="P2"/>
      <text:p text:style-name="P2"/>
      <text:p text:style-name="P2"/>
      <text:p text:style-name="P2"/>
      <text:p text:style-name="P2"/>
      <text:p text:style-name="P2"><text:soft-page-break/></text:p>
      <text:p text:style-name="P8">1) Contexte du projet</text:p>
      <text:p text:style-name="P9"/>
      <text:p text:style-name="P9">Dans la matinée <text:s/>du 11 mai, on nous présente le projet Plazza,</text:p>
      <text:p text:style-name="P10">Du nom de la pizzeria à côté d’epitech paris, notre objectif sera de crééer une pizzeria virtuelle;<text:line-break/>Dans notre pizzeria imaginaire, on aurait une réception, puis des cuisines (plusieures car nous avons une grande pizzeria) et enfin des cuisiniers.</text:p>
      <text:p text:style-name="P10"/>
      <text:p text:style-name="P10">Dans ce projet, il y a deux parties:</text:p>
      <text:p text:style-name="P10">- la réception qui envoie les commandes aux cuisines</text:p>
      <text:p text:style-name="P10">- et les cuisiniers qui travaillent dans les cuisines</text:p>
      <text:p text:style-name="P10"/>
      <text:p text:style-name="P10">Parlons d’abord de la première, la réception qui envoie les commandes aux cuisines, le multi-processing.</text:p>
      <text:p text:style-name="P11">Je vous parle de cuisines et de réception, mais pour la machine, ces objets ne sont rien de plus que des Process, des programmes, ca peut sembler fou mais notre objectif ici est de coordiner plusieurs programmes en simultané, <text:span text:style-name="T5">de les faire communiquer et travailler ensemble pour que les commandes soient écoulées le plus vite possible.</text:span></text:p>
      <text:p text:style-name="P12">Les challenges principaux étaient:</text:p>
      <text:p text:style-name="P12">- créer une communication stable entre nos programmes</text:p>
      <text:p text:style-name="P12">- de faire une interface client <text:span text:style-name="T6">(recup commandes)</text:span></text:p>
      <text:p text:style-name="P12">- lorsqu’il y a un problème, s’assurer de le communiquer à toutes les cuisines pour qu’elles ne continuent pas à s’exécuter indépendamment (e.g, s’il y a le feu dans une cuisine, prévenir les autres cuisines par exemple)<text:line-break/></text:p>
      <text:p text:style-name="P12">passons à la partie des cuisiners, plusieurs cuisiniers se partagent les ingrédients, on appelle ca le multi-threading,<text:line-break/>Le principe est à peu près le même, à la distinction près que cette fois-ci, nos programmes utilisent les mêmes ressources, les enjeux changent:<text:line-break/>- synchroniser l’accès aux ressources, si deux cuisiniers veulent la meme poire, il faut départager</text:p>
      <text:p text:style-name="P12">- répartir le travail équitablement</text:p>
      <text:p text:style-name="P12">- renvoyer les commandes <text:span text:style-name="T6">à la réception </text:span>une fois terminées<text:line-break/></text:p>
      <text:p text:style-name="P13"><text:span text:style-name="T7">En résumé, ce</text:span> qui rend ce projet différent des autres, c’est que <text:span text:style-name="T6">tout se fait en simultané, du fait qu’on gère plusieurs programmes à la fois, noyre projet peut simuler 10 cuisines en parallèle, chacune faisant un travail différent.</text:span></text:p>
      <text:p text:style-name="P14"/>
      <text:p text:style-name="P15"/>
      <text:p text:style-name="P15">Nous avons ensuite procédé à l’étape définissante du projet, le brainstorm.</text:p>
      <text:p text:style-name="P15">Malheureusement, mon partenaire de travail n’a pas su se rendre disponible. <text:span text:style-name="T8">J</text:span>’ai donc du <text:span text:style-name="T8">m’adapter pour proposer une planification d’autant plus efficace:</text:span></text:p>
      <text:p text:style-name="P16">- Mon organisation reposait surtout sur un travail clair et documenté grace à quoi j’aurais pu permettre à mon partenaire de me rejoindre à tout moment,</text:p>
      <text:p text:style-name="P16">- de créer des étapes de rendu intermédiaires afin de m’assurer que je pouvais avoir un travail correct malgré mon incertitude de proposer un projet complet,</text:p>
      <text:p text:style-name="P16">- de créer des taches dynamiques qui me permettent de structurer mon temps avec des deadlines,</text:p>
      <text:p text:style-name="P16">(github project, c’est à dire la version développeur du kanban)</text:p>
      <text:p text:style-name="P16">- et enfin d’isoler avec le plus de précision mes sprint goals, soit les objectifs de projet, j’ai donc créé une documentation complète (un README.md) ainsi que 4 objectifs de rendu ou je dois proposer une vesion fonctionnelle du projet (ce qu’on apelle des github milestones)</text:p>
      <text:p text:style-name="P15"/>
      <text:p text:style-name="P16"><text:soft-page-break/>Cette planification reste après tout le point fort de ce projet, sachant que par la suite, j’ai pu suivre mon organisation sans différer tout au long du projet, malgré une efficacité de travail souvent compliquée à avoir pour moi. J’ai su compléter mes taches, versionner et proposer un rendu final fonctionnel et testé <text:span text:style-name="T9">meme si une petite partie manquait</text:span>.</text:p>
      <text:p text:style-name="P17"/>
      <text:p text:style-name="P18">Si mon mate avait été présent pour le brainstorm, nous aurions pu discuter de nos objectifs en privilégiant l’écoute et ensuite nous aurions réparti le travail en fonction de nos compétences et apétences.</text:p>
      <text:p text:style-name="P18">Enfin j’aurais proposé de répartir les roles suivants:</text:p>
      <text:p text:style-name="P19">quality control, <text:span text:style-name="T9">soit qui vérifie le code</text:span></text:p>
      <text:p text:style-name="P19">timing control, <text:span text:style-name="T9">soit la personne qui gère la timeline</text:span></text:p>
      <text:p text:style-name="P19">decisionnal control, <text:span text:style-name="T9">soit la personne qui a le droit de véto sur les décisions de l’équipe</text:span></text:p>
      <text:p text:style-name="P19">task assignment control, <text:span text:style-name="T9">soit la personne qui s’occupe de répartir les taches non assignées</text:span></text:p>
      <text:p text:style-name="P19"/>
      <text:p text:style-name="P17"/>
      <text:p text:style-name="P20">2)L’exection du planning</text:p>
      <text:p text:style-name="P21"/>
      <text:p text:style-name="P21">j’ai malgré moi récupéré ce role de lead.</text:p>
      <text:p text:style-name="P21">Par mes compétences en la matière et par le fait que j’aie designé l’architecture moi-seule j’avais de meilleures dispositions pour avancer, et <text:span text:style-name="T9">donc en plus de devoir avancer, j’ai du aussi tenter de me libérer à plusieures reprises pour lancer mon partenaire sur le projet. Sans succès, j’ai donc pris les mesures nécessaires pour m’assurer une notation équitable auprès de l’équipe pédagogique. Je ne pense pas avoir eu la possibilité de gérer mieux cette situation.</text:span></text:p>
      <text:p text:style-name="P21"/>
      <text:p text:style-name="P22">Enfin grace à ma planification de projet, et l’avantage de travailler seule je n’ai pas eu d’autres problèmes d’organisation sur le projet.</text:p>
      <text:p text:style-name="P22"/>
      <text:p text:style-name="P22">Ma difficulté principale fut d’utiliser des technologies nouvelles pour le quality control (helgrind et Tsan pour le multiprocess) ainsi que pour le multiprocessing. J’ai donc du passer beaucoup de temps à lire des documentation sans fin, mais j’ai aussi intérrogé des humains pour m’assurer que je comprenais de la bonne manière, et j’en ai appris que j’avais tendance à aborder certains sujets complexes trop en surface sans lire en détail. J’ai donc appris que la lecture de la documentation, malgré sa lenteur parfois est trop importante pour être négligée du fait des bugs qui peuvent en découler.<text:line-break/><text:line-break/>Enfin, le jour du rendu, j’étais en retard sur le développement de mon projet et il fallait que je produise un rendu efficace sans digression, j’ai pris la décision de ne pas rendre cette partie.</text:p>
      <text:p text:style-name="P22"/>
      <text:p text:style-name="P22">En effet, dans mon workflow de production, j’avais besoin de m’assurer de ne pas avoir ajouté de bugs, et aussi de me concentrer sur la qualité du rendu alors que dans les délais prévus je n’avais plus le temps de prendre les précautions nécessaires.</text:p>
      <text:p text:style-name="P22"/>
      <text:p text:style-name="P22">Si les choses étaient à refaire, je pense qu’avec une échéance comme celle-ci j’aurais du prioritiser des taches en cycle-court, afin de toujours pouvoir m’assurer de produire un rendu à la limite de ce que je pouvais produire.</text:p>
      <text:p text:style-name="P21"/>
      <text:p text:style-name="P21"/>
      <text:p text:style-name="P21"/>
      <text:p text:style-name="P23">-</text:p>
      <text:p text:style-name="P21"/>
      <text:p text:style-name="P21"/>
      <text:p text:style-name="P24"><text:soft-page-break/><text:span text:style-name="T2">Conclusion, comment faire </text:span>la prochaine fois?</text:p>
      <text:p text:style-name="P25">Si je devais recommencer le projet demain, je serais plus ferme sur les rendez-vous de travail ainsi que sur la timeline du projet, car même dans des cas d’autodiscipline il est important d’apprendre à faire des concessions pour mieux respecter les déla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30T17:27:03.163090838</meta:creation-date>
    <meta:print-date>2026-05-30T23:13:49.943895357</meta:print-date>
    <dc:date>2026-06-02T14:45:29.794365976</dc:date>
    <meta:editing-duration>PT15M49S</meta:editing-duration>
    <meta:editing-cycles>2</meta:editing-cycles>
    <meta:generator>LibreOffice/25.8.2.2$Linux_X86_64 LibreOffice_project/d401f2107ccab8f924a8e2df40f573aab7605b6f</meta:generator>
    <meta:document-statistic meta:table-count="0" meta:image-count="0" meta:object-count="0" meta:page-count="4" meta:paragraph-count="64" meta:word-count="1123" meta:character-count="6792" meta:non-whitespace-character-count="5729"/>
  </office:meta>
</office:document-meta>
</file>