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text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text"/>
  <manifest:file-entry manifest:full-path="settings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path draw:style-name="gr1" draw:text-style-name="P1" draw:layer="layout" svg:width="6.838cm" svg:height="3.997cm" draw:transform="rotate (1.32575209981489) translate (4.03855394586797cm 10.4163543206531cm)" svg:viewBox="0 0 6839 3998" svg:d="M0 506c1085 80 2166-30 3241-164 915-113 1823-53 2698-305 1030-297 1038 1276 707 1904-449 852-871 1996-1936 2055-845 47-1006-1077-1045-1772-32-585 43-1183 316-1698">
          <text:p/>
        </draw:path>
        <draw:path draw:style-name="gr1" draw:text-style-name="P1" draw:layer="layout" svg:width="5.547cm" svg:height="4.216cm" draw:transform="rotate (-1.5707963267949) translate (14.305cm 6.279cm)" svg:viewBox="0 0 5548 4217" svg:d="M0 4081c1360 0 2741 239 4080 0 370-66 2053 588 1256-493-421-571-606-1285-762-1974l-135-538-90-942-44-134">
          <text:p/>
        </draw:path>
        <draw:path draw:style-name="gr1" draw:text-style-name="P1" draw:layer="layout" svg:width="3.046cm" svg:height="5.13cm" svg:x="15.025cm" svg:y="6.637cm" svg:viewBox="0 0 3047 5131" svg:d="M132 0c-44 1328-298 2701 45 3991 86 322-12 1688 717 897 597-648 1419-931 2108-1435h45">
          <text:p/>
        </draw:path>
        <draw:path draw:style-name="gr1" draw:text-style-name="P1" draw:layer="layout" svg:width="5.156cm" svg:height="8.519cm" svg:x="14.305cm" svg:y="5.606cm" svg:viewBox="0 0 5157 8520" svg:d="M0 0c599 743 1296 1402 1839 2197 514 752 845 1597 1300 2377 312 534 500 1082 673 1659 214 712 642 1284 1031 1884l314 403">
          <text:p/>
        </draw:path>
        <draw:path draw:style-name="gr1" draw:text-style-name="P1" draw:layer="layout" svg:width="4.674cm" svg:height="1.163cm" draw:transform="rotate (1.25576439680992) translate (14.2151054244644cm 14.538056464967cm)" svg:viewBox="0 0 4675 1164" svg:d="M0 1133c906-125 2062 310 2725-323 458-436 2582 281 1764-810">
          <text:p/>
        </draw:path>
        <draw:path draw:style-name="gr1" draw:text-style-name="P1" draw:layer="layout" svg:width="3.879cm" svg:height="5.984cm" svg:x="20.18cm" svg:y="7.155cm" svg:viewBox="0 0 3880 5985" svg:d="M0 514c978-336 2063-142 3049-449 1052-328 930 674 583 1166-540 764-1074 1592-1256 2512-72 365-2216 2163-313 1390 463-188 1521-832 1166 538l313 314">
          <text:p/>
        </draw:path>
        <draw:path draw:style-name="gr1" draw:text-style-name="P1" draw:layer="layout" svg:width="6.884cm" svg:height="5.354cm" draw:transform="skewX (5.05259578698982E-017) rotate (0.463733982254893) translate (21.2951088955709cm 9.8243625253503cm)" svg:viewBox="0 0 6885 5355" svg:d="M4318 0c898 80 2247 17 2527 862 341 1030-1621 829-2347 1384-985 753-2277 1015-3309 1705-285 191-1999 420-722 842 518 171 1051 275 1524 562">
          <text:p/>
        </draw:path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path draw:style-name="gr1" draw:text-style-name="P1" draw:layer="layout" svg:width="3.45cm" svg:height="2.644cm" draw:transform="rotate (1.5707963267949) translate (3.42283181558269cm 8.311cm)" svg:viewBox="0 0 3451 2645" svg:d="M0 105c562-81 1131-116 1696-102 448 12 883 156 1289 339 665 300 473 1103 305 1628-169 527-932 908-1356 509-376-354-259-946-204-1424l102-374 34-67">
          <text:p/>
        </draw:path>
        <draw:path draw:style-name="gr1" draw:text-style-name="P1" draw:layer="layout" svg:width="1.864cm" svg:height="1.288cm" draw:transform="rotate (-1.5707963267949) translate (8.175cm 5.801cm)" svg:viewBox="0 0 1865 1289" svg:d="M0 1119c552 71 1108 112 1662 170l203-746v-373-170">
          <text:p/>
        </draw:path>
        <draw:path draw:style-name="gr1" draw:text-style-name="P1" draw:layer="layout" svg:width="2.322cm" svg:height="2.674cm" svg:x="12.313cm" svg:y="5.97cm" svg:viewBox="0 0 2323 2675" svg:d="M1561 0c-892 256-1539 1060-1561 2103-17 811 1028 647 1289 204 214-364 1272-670 984-1323-143-324-540-811-950-543h-135">
          <text:p/>
        </draw:path>
        <draw:path draw:style-name="gr1" draw:text-style-name="P1" draw:layer="layout" svg:width="3.832cm" svg:height="3.73cm" svg:x="11.228cm" svg:y="5.326cm" svg:viewBox="0 0 3833 3731" svg:d="M0 0c706 369 1280 942 1933 1391 522 360 1039 757 1391 1289 209 316 382 658 509 1017v34">
          <text:p/>
        </draw:path>
        <draw:path draw:style-name="gr1" draw:text-style-name="P1" draw:layer="layout" svg:width="10.481cm" svg:height="6.642cm" draw:transform="skewX (1.07004581424045E-016) rotate (0.782431103669058) translate (14.7527006345555cm 9.30190159386935cm)" svg:viewBox="0 0 10482 6643" svg:d="M3130 1330c1370-79 2726 551 4077 229 915-219 3499 237 3259-970-260-1311-2385-76-3428 275-1241 417-2369 1129-3618 1521-801 252-1605 515-2444 631-520 72-1984 498 143-480 675-311 1295-737 2011-917 540-136 852 376 1226 644 396 283 1169 102 1345 571 203 544-2866 268-406 745 497 96 424 897 724 1293 238 314 538 615 1056 476 287-77 813 400 434 815l-407 312 360 168 240-49">
          <text:p/>
        </draw:path>
        <draw:path draw:style-name="gr1" draw:text-style-name="P1" draw:layer="layout" svg:width="0.478cm" svg:height="-0.001cm" draw:transform="rotate (2.35619449019235) translate (24.966cm 7.056cm)" svg:viewBox="0 0 479 0" svg:d="M0 0h479">
          <text:p/>
        </draw:path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path draw:style-name="gr1" draw:text-style-name="P1" draw:layer="layout" svg:width="4.799cm" svg:height="4.312cm" draw:transform="rotate (0.619591884457987) translate (0.140519251214806cm 7.02784748569178cm)" svg:viewBox="0 0 4800 4313" svg:d="M2912 0c65 457 3064-486 1371 703-911 641-1757 1347-2616 2045-591 481-1118 1035-1667 1565">
          <text:p/>
        </draw:path>
        <draw:path draw:style-name="gr1" draw:text-style-name="P1" draw:layer="layout" svg:width="3.76cm" svg:height="0.312cm" draw:transform="rotate (0.142418866962737) translate (5.515cm 8.521cm)" svg:viewBox="0 0 3761 313" svg:d="M0 0c916 2 1819 169 2734 210l494 27 533 76">
          <text:p/>
        </draw:path>
        <draw:path draw:style-name="gr1" draw:text-style-name="P1" draw:layer="layout" svg:width="5.515cm" svg:height="0.508cm" svg:x="12.063cm" svg:y="7.663cm" svg:viewBox="0 0 5516 509" svg:d="M0 499c934 63 1850-181 2780-224 915-44 1815-317 2736-269">
          <text:p/>
        </draw:path>
        <draw:path draw:style-name="gr1" draw:text-style-name="P1" draw:layer="layout" svg:width="5.066cm" svg:height="0.357cm" svg:x="21.525cm" svg:y="8.252cm" svg:viewBox="0 0 5067 358" svg:d="M0 0c754 152 1529 88 2287 224l2108 134h672">
          <text:p/>
        </draw:path>
        <draw:path draw:style-name="gr1" draw:text-style-name="P1" draw:layer="layout" svg:width="4.814cm" svg:height="4.833cm" draw:transform="skewX (8.00284623500938E-017) rotate (0.621162680784782) translate (0.370822551136684cm 6.87714604228775cm)" svg:viewBox="0 0 4815 4834" svg:d="M0 4834c1117-16 2307-311 3087-1155 670-726 1297-1546 1576-2511l152-444-41-635-47-89">
          <text:p/>
        </draw:path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path draw:style-name="gr1" draw:text-style-name="P1" draw:layer="layout" svg:width="1.666cm" svg:height="1.196cm" draw:transform="rotate (1.5707963267949) translate (9.56471637582335cm 3.364cm)" svg:viewBox="0 0 1667 1197" svg:d="M628 76c309 0 1125-375 1032 538-82 811-1184 575-808-89l-538 493-314 179">
          <text:p/>
        </draw:path>
        <draw:path draw:style-name="gr1" draw:text-style-name="P1" draw:layer="layout" svg:width="6.307cm" svg:height="3.839cm" svg:x="2.257cm" svg:y="3.05cm" svg:viewBox="0 0 6308 3840" svg:d="M6308 0c-905 705-1844 1366-2825 1973-974 603-1958 1142-3005 1569-1547 631 1149 66 1211 45l852-179 448-135h90">
          <text:p/>
        </draw:path>
        <draw:path draw:style-name="gr1" draw:text-style-name="P1" draw:layer="layout" svg:width="1.524cm" svg:height="2.51cm" svg:x="2.062cm" svg:y="4.709cm" svg:viewBox="0 0 1525 2511" svg:d="M1525 0c-502 468-771 1105-1076 1704l-224 449-225 358">
          <text:p/>
        </draw:path>
        <draw:path draw:style-name="gr1" draw:text-style-name="P1" draw:layer="layout" svg:width="1.26cm" svg:height="1.94cm" svg:x="10.533cm" svg:y="3.902cm" svg:viewBox="0 0 1261 1941" svg:d="M5 0c-38 496 152 990 90 1480-134 1069 1012-25 986-269l180-225">
          <text:p/>
        </draw:path>
        <draw:path draw:style-name="gr1" draw:text-style-name="P1" draw:layer="layout" svg:width="1.544cm" svg:height="0.223cm" draw:transform="rotate (-0.539132205941048) translate (9.462cm 5.068cm)" svg:viewBox="0 0 1545 224" svg:d="M0 0l707 47 716 147 122 30">
          <text:p/>
        </draw:path>
        <draw:path draw:style-name="gr1" draw:text-style-name="P1" draw:layer="layout" svg:width="8.578cm" svg:height="3.099cm" svg:x="12.332cm" svg:y="2.063cm" svg:viewBox="0 0 8579 3100" svg:d="M0 1345c1479-34 2972 43 4439 270 1103 171 2166 547 3274 672 539 61 1042 1707 807 135l-448-718-1076-1300-359-404">
          <text:p/>
        </draw:path>
        <draw:path draw:style-name="gr1" draw:text-style-name="P1" draw:layer="layout" svg:width="2.056cm" svg:height="0.1cm" draw:transform="rotate (-0.321664181142555) translate (19.4039479535942cm 5.06112853757813cm)" svg:viewBox="0 0 2057 101" svg:d="M0 101c644-125 1305-108 1958-84l99 13">
          <text:p/>
        </draw:path>
        <draw:path draw:style-name="gr1" draw:text-style-name="P1" draw:layer="layout" svg:width="2.16cm" svg:height="0.143cm" draw:transform="rotate (-2.10992853273595) translate (1.96129828702509cm 7.69776327788058cm)" svg:viewBox="0 0 2161 144" svg:d="M0 144c707-44 1412-133 2122-121l39-23">
          <text:p/>
        </draw:path>
        <draw:path draw:style-name="gr1" draw:text-style-name="P1" draw:layer="layout" svg:width="7.617cm" svg:height="4.665cm" svg:x="0.896cm" svg:y="7.402cm" svg:viewBox="0 0 7618 4666" svg:d="M314 3809c765 62 1538 101 2287 270 1037 234 2065 504 3095 358 486-69 1886 836 1480-538-164-556 11-1137 44-1704 37-649 659-1395 270-1928-468-641-1389 71-2108 89-732 18-1437-92-2153-89-691 2-1377-35-2063-90l-448-90-718-45">
          <text:p/>
        </draw:path>
        <draw:path draw:style-name="gr1" draw:text-style-name="P1" draw:layer="layout" svg:width="6.961cm" svg:height="7.247cm" draw:transform="rotate (-1.5707963267949) translate (15.9032178896712cm 6.67502452539713cm)" svg:viewBox="0 0 6962 7248" svg:d="M904 6531c921 290 1824-4 2780 0 1001 4 2076-14 2960-493 907-492-422-1138-359-1974 62-820-133-1752-672-2376-742-860-2098-790-3184-987-602-109-1168-304-1704-583-1199-625-552 1412-538 1794 29 754 159 1505 313 2242 158 759 194 1527 314 2287v538l-45 269">
          <text:p/>
        </draw:path>
        <draw:path draw:style-name="gr1" draw:text-style-name="P1" draw:layer="layout" svg:width="8.566cm" svg:height="5.41cm" svg:x="18.502cm" svg:y="6.29cm" svg:viewBox="0 0 8567 5411" svg:d="M153 213c-183 1351-223 2734 0 4081 107 648 796 1288 1480 1076 1101-341 2238-224 3363-449 781-156 1637-112 2332-493 426-234 1745 293 1032-807-476-732-632-1596-987-2377-215-473-211-1434-1031-1211-643 175-1279 368-1929 494-649 126-1316 51-1973 45-614-5-1236 76-1839-90l-448-45h-45">
          <text:p/>
        </draw:path>
        <draw:path draw:style-name="gr1" draw:text-style-name="P1" draw:layer="layout" svg:width="0.63cm" svg:height="0.064cm" draw:transform="rotate (-1.8163641525505) translate (24.2794101666107cm 8.40189224133638cm)" svg:viewBox="0 0 631 65" svg:d="M0 65l457-21 174-44">
          <text:p/>
        </draw:path>
        <draw:path draw:style-name="gr1" draw:text-style-name="P1" draw:layer="layout" svg:width="0.096cm" svg:height="1.569cm" svg:x="20.531cm" svg:y="7.534cm" svg:viewBox="0 0 97 1570" svg:d="M97 0c-36 462-123 923-90 1390v180">
          <text:p/>
        </draw:path>
        <draw:path draw:style-name="gr1" draw:text-style-name="P1" draw:layer="layout" svg:width="1.216cm" svg:height="0.004cm" draw:transform="rotate (-1.68197380014694) translate (21.7500684421495cm 9.73211927854879cm)" svg:viewBox="0 0 1217 5" svg:d="M0 1l767 4 450-5">
          <text:p/>
        </draw:path>
        <draw:path draw:style-name="gr1" draw:text-style-name="P1" draw:layer="layout" svg:width="0.223cm" svg:height="1.703cm" svg:x="12.87cm" svg:y="8.207cm" svg:viewBox="0 0 224 1704" svg:d="M224 0c-98 535 22 1107-224 1614v90">
          <text:p/>
        </draw:path>
        <draw:path draw:style-name="gr1" draw:text-style-name="P1" draw:layer="layout" svg:width="0.044cm" svg:height="0.851cm" svg:x="11.031cm" svg:y="9.463cm" svg:viewBox="0 0 45 852" svg:d="M45 0v672l-45 180">
          <text:p/>
        </draw:path>
        <draw:path draw:style-name="gr1" draw:text-style-name="P1" draw:layer="layout" svg:width="1.078cm" svg:height="0.06cm" draw:transform="rotate (-1.69541283538729) translate (12.8250784479287cm 11.1276467792277cm)" svg:viewBox="0 0 1079 61" svg:d="M0 45l590 16 444-55 45-6">
          <text:p/>
        </draw:path>
        <draw:path draw:style-name="gr1" draw:text-style-name="P1" draw:layer="layout" svg:width="1.345cm" svg:height="0.044cm" draw:transform="rotate (-1.5707963267949) translate (2.018cm 8.61cm)" svg:viewBox="0 0 1346 45" svg:d="M0 45l628-45h673 45">
          <text:p/>
        </draw:path>
        <draw:path draw:style-name="gr1" draw:text-style-name="P1" draw:layer="layout" svg:width="0.762cm" svg:height="0cm" draw:transform="rotate (-1.5707963267949) translate (5.291cm 8.7cm)" svg:viewBox="0 0 763 0" svg:d="M0 0h538 225">
          <text:p/>
        </draw:path>
        <draw:path draw:style-name="gr1" draw:text-style-name="P1" draw:layer="layout" svg:width="0.133cm" svg:height="1.344cm" svg:x="5.381cm" svg:y="10.539cm" svg:viewBox="0 0 134 1345" svg:d="M0 0l90 493 44 449v403">
          <text:p/>
        </draw:path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3" draw:text-style-name="P3" draw:layer="layout" svg:width="50.284cm" svg:height="8.871cm" svg:x="1.905cm" svg:y="-3.7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path draw:style-name="gr1" draw:text-style-name="P1" draw:layer="layout" svg:width="7.148cm" svg:height="1.479cm" draw:transform="rotate (-2.29720236147494) translate (10.3105319549914cm 4.81581563160531cm)" svg:viewBox="0 0 7149 1480" svg:d="M0 1376c1409 178 2919 186 4156-454 538-278 4515-248 2357-655-687-129-1373-327-2081-249l-64-4">
          <text:p/>
        </draw:path>
        <draw:path draw:style-name="gr1" draw:text-style-name="P1" draw:layer="layout" svg:width="0.358cm" svg:height="2.196cm" svg:x="4.663cm" svg:y="7.893cm" svg:viewBox="0 0 359 2197" svg:d="M0 0c214 685 200 1411 359 2108v89">
          <text:p/>
        </draw:path>
        <draw:path draw:style-name="gr1" draw:text-style-name="P1" draw:layer="layout" svg:width="5.867cm" svg:height="2.722cm" draw:transform="rotate (-0.785398163397448) translate (14.664cm 3.005cm)" svg:viewBox="0 0 5868 2723" svg:d="M0 952c1399 46 2836-31 4185 379 314 96 1760 0 666 794-181 131-1694 1104-760 253 484-442 1513-294 1743-919 261-706-1065-877-1617-1301l-285-158">
          <text:p/>
        </draw:path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3" draw:text-style-name="P3" draw:layer="layout" svg:width="50.284cm" svg:height="8.871cm" svg:x="1.905cm" svg:y="-3.79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path draw:style-name="gr1" draw:text-style-name="P1" draw:layer="layout" svg:width="7.148cm" svg:height="1.479cm" draw:transform="rotate (-2.29720236147494) translate (10.3105319549914cm 4.81581563160531cm)" svg:viewBox="0 0 7149 1480" svg:d="M0 1376c1409 178 2919 186 4156-454 538-278 4515-248 2357-655-687-129-1373-327-2081-249l-64-4">
          <text:p/>
        </draw:path>
        <draw:path draw:style-name="gr1" draw:text-style-name="P1" draw:layer="layout" svg:width="0.358cm" svg:height="2.196cm" svg:x="4.663cm" svg:y="7.893cm" svg:viewBox="0 0 359 2197" svg:d="M0 0c214 685 200 1411 359 2108v89">
          <text:p/>
        </draw:path>
        <draw:path draw:style-name="gr1" draw:text-style-name="P1" draw:layer="layout" svg:width="5.867cm" svg:height="2.722cm" draw:transform="rotate (-0.785398163397448) translate (14.664cm 3.005cm)" svg:viewBox="0 0 5868 2723" svg:d="M0 952c1399 46 2836-31 4185 379 314 96 1760 0 666 794-181 131-1694 1104-760 253 484-442 1513-294 1743-919 261-706-1065-877-1617-1301l-285-158">
          <text:p/>
        </draw:path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3" draw:text-style-name="P3" draw:layer="layout" svg:width="50.284cm" svg:height="8.871cm" svg:x="0cm" svg:y="-3.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path draw:style-name="gr1" draw:text-style-name="P1" draw:layer="layout" svg:width="4.805cm" svg:height="0.978cm" draw:transform="rotate (-1.95284890005646) translate (8.0814095596615cm 4.02310778212944cm)" svg:viewBox="0 0 4806 979" svg:d="M0 687c824-7 1643 90 2465 122 781 29 1565 61 2341 170l-650-415-892-415-350-149">
          <text:p/>
        </draw:path>
        <draw:path draw:style-name="gr1" draw:text-style-name="P1" draw:layer="layout" svg:width="2.205cm" svg:height="0.003cm" draw:transform="rotate (-1.10496794943761) translate (4.708cm 7.131cm)" svg:viewBox="0 0 2206 4" svg:d="M0 0c634 1 1269 2 1905 4h301">
          <text:p/>
        </draw:path>
        <draw:path draw:style-name="gr1" draw:text-style-name="P1" draw:layer="layout" svg:width="5.777cm" svg:height="14.166cm" draw:transform="rotate (-0.32323497746935) translate (13.8193765599265cm 0.291979334189544cm)" svg:viewBox="0 0 5778 14167" svg:d="M0 23c610 168 1498-529 1731 934 86 540-1890 1594-395 1362 829-129 517 1267 783 1913 157 381-1087 1312 285 992 741-173 55 1460-294 2085-657 1175 679 1301 1249 1190 657-128 1498 444 895 1261-182 247-1024 1064 243 1147 766 51 55 1252-82 1873-170 765 533 932 924 1203l439 184">
          <text:p/>
        </draw:path>
        <draw:path draw:style-name="gr1" draw:text-style-name="P1" draw:layer="layout" svg:width="0.361cm" svg:height="-0.001cm" draw:transform="rotate (-1.4461798182025) translate (10.3590291883991cm 3.31899634369742cm)" svg:viewBox="0 0 362 0" svg:d="M0 0h362">
          <text:p/>
        </draw:path>
        <draw:path draw:style-name="gr1" draw:text-style-name="P1" draw:layer="layout" svg:width="1.026cm" svg:height="0.099cm" draw:transform="rotate (-1.43151905248575) translate (17.31cm 3.274cm)" svg:viewBox="0 0 1027 100" svg:d="M0 0l583 37 444 63">
          <text:p/>
        </draw:path>
        <draw:path draw:style-name="gr1" draw:text-style-name="P1" draw:layer="layout" svg:width="4.92cm" svg:height="0.969cm" draw:transform="rotate (-1.42837745983216) translate (12.964230634386cm 3.7663203260128cm)" svg:viewBox="0 0 4921 970" svg:d="M0 956c1023 103 1987-390 3000-385 647 3 1275-238 1921-133l-615-133-513-209-349-96">
          <text:p/>
        </draw:path>
        <draw:path draw:style-name="gr1" draw:text-style-name="P1" draw:layer="layout" svg:width="1.783cm" svg:height="0.256cm" draw:transform="rotate (-1.10496794943761) translate (11.9334687853509cm 7.01563940069367cm)" svg:viewBox="0 0 1784 257" svg:d="M0 257c579-76 1160-142 1745-177l39-80">
          <text:p/>
        </draw:path>
        <draw:path draw:style-name="gr1" draw:text-style-name="P1" draw:layer="layout" svg:width="2.331cm" svg:height="1.03cm" draw:transform="rotate (-1.5707963267949) translate (16.816cm 4.216cm)" svg:viewBox="0 0 2332 1031" svg:d="M0 941c731 44 1476-97 2197 90l135-448-404-449-224-134">
          <text:p/>
        </draw:path>
        <draw:path draw:style-name="gr1" draw:text-style-name="P1" draw:layer="layout" svg:width="0.602cm" svg:height="0.007cm" draw:transform="rotate (-0.850848010347236) translate (15.1632826418807cm 5.6454902709452cm)" svg:viewBox="0 0 603 8" svg:d="M0 8l603-8">
          <text:p/>
        </draw:path>
        <draw:path draw:style-name="gr1" draw:text-style-name="P1" draw:layer="layout" svg:width="3.181cm" svg:height="1.541cm" draw:transform="rotate (-1.01298909785751) translate (19.7928493361585cm 3.15183002647673cm)" svg:viewBox="0 0 3182 1542" svg:d="M0 654c635-86 1327 335 1893 17 449-251 2042 578 863-623-335-342 490 1248-236 1227l-565 228-24 39">
          <text:p/>
        </draw:path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0T20:10:18.421390363</meta:creation-date>
    <dc:date>2026-05-30T23:24:03.165863083</dc:date>
    <meta:editing-duration>PT2H37M55S</meta:editing-duration>
    <meta:editing-cycles>1</meta:editing-cycles>
    <meta:document-statistic meta:object-count="98"/>
    <meta:generator>LibreOffice/25.8.2.2$Linux_X86_64 LibreOffice_project/d401f2107ccab8f924a8e2df40f573aab7605b6f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94b9" officeooo:paragraph-rsid="001694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mutiprocessing, multithreadé</text:p>
    </office:text>
  </office:body>
</office:document-content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07b" officeooo:paragraph-rsid="0017e0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lti-processing</text:p>
    </office:text>
  </office:body>
</office:document-content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07b" officeooo:paragraph-rsid="0017e07b"/>
    </style:style>
    <style:style style:name="T1" style:family="text">
      <style:text-properties officeooo:rsid="00174a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lti-<text:span text:style-name="T1">threading</text:span></text:p>
    </office:text>
  </office:body>
</office:document-content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